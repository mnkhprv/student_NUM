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justify" style:justify-single-word="false"/>
      <style:text-properties fo:color="#000000" loext:opacity="100%" style:font-name="Nimbus Roman" officeooo:rsid="001e7c0d" officeooo:paragraph-rsid="001e7c0d"/>
    </style:style>
    <style:style style:name="P2" style:family="paragraph" style:parent-style-name="Standard">
      <style:paragraph-properties fo:line-height="115%" fo:text-align="justify" style:justify-single-word="false"/>
      <style:text-properties fo:color="#000000" loext:opacity="100%" style:font-name="Nimbus Roman" officeooo:rsid="001f5c21" officeooo:paragraph-rsid="001f5c21"/>
    </style:style>
    <style:style style:name="P3" style:family="paragraph" style:parent-style-name="Standard">
      <style:paragraph-properties fo:line-height="115%" fo:text-align="justify" style:justify-single-word="false"/>
      <style:text-properties fo:color="#000000" loext:opacity="100%" style:font-name="Nimbus Roman" officeooo:rsid="0020ad95" officeooo:paragraph-rsid="0020ad95"/>
    </style:style>
    <style:style style:name="P4" style:family="paragraph" style:parent-style-name="Standard">
      <style:paragraph-properties fo:line-height="115%" fo:text-align="end" style:justify-single-word="false"/>
      <style:text-properties fo:color="#000000" loext:opacity="100%" style:font-name="Nimbus Roman" officeooo:rsid="0022f964" officeooo:paragraph-rsid="0022f964"/>
    </style:style>
    <style:style style:name="P5" style:family="paragraph" style:parent-style-name="Text_20_body">
      <style:paragraph-properties fo:line-height="115%" fo:text-align="justify" style:justify-single-word="false"/>
      <style:text-properties fo:color="#000000" loext:opacity="100%" style:font-name="Nimbus Roman" officeooo:rsid="0021db85" officeooo:paragraph-rsid="0021db85"/>
    </style:style>
    <style:style style:name="P6" style:family="paragraph" style:parent-style-name="Text_20_body">
      <style:paragraph-properties fo:line-height="115%" fo:text-align="justify" style:justify-single-word="false"/>
      <style:text-properties fo:color="#000000" loext:opacity="100%" style:font-name="Nimbus Roman" officeooo:rsid="002248a8" officeooo:paragraph-rsid="002248a8"/>
    </style:style>
    <style:style style:name="P7" style:family="paragraph" style:parent-style-name="Standard" style:list-style-name="L3">
      <style:paragraph-properties fo:line-height="115%" fo:text-align="justify" style:justify-single-word="false"/>
      <style:text-properties officeooo:paragraph-rsid="0020ad95"/>
    </style:style>
    <style:style style:name="P8" style:family="paragraph" style:parent-style-name="Standard">
      <style:paragraph-properties fo:line-height="115%" fo:text-align="justify" style:justify-single-word="false"/>
      <style:text-properties fo:color="#000000" loext:opacity="100%" style:font-name="Nimbus Roman" fo:font-weight="bold" officeooo:rsid="001e7c0d" officeooo:paragraph-rsid="001e7c0d" style:font-weight-asian="bold" style:font-weight-complex="bold"/>
    </style:style>
    <style:style style:name="P9" style:family="paragraph" style:parent-style-name="Standard">
      <style:paragraph-properties fo:line-height="115%" fo:text-align="justify" style:justify-single-word="false"/>
      <style:text-properties fo:color="#000000" loext:opacity="100%" style:font-name="Nimbus Roman" fo:font-weight="bold" officeooo:rsid="0020ad95" officeooo:paragraph-rsid="0020ad95" style:font-weight-asian="bold" style:font-weight-complex="bold"/>
    </style:style>
    <style:style style:name="P10" style:family="paragraph" style:parent-style-name="Standard" style:list-style-name="L3">
      <style:paragraph-properties fo:line-height="115%" fo:text-align="justify" style:justify-single-word="false"/>
      <style:text-properties fo:color="#000000" loext:opacity="100%" style:font-name="Nimbus Roman" fo:font-weight="bold" officeooo:rsid="0020ad95" officeooo:paragraph-rsid="0020ad95" style:font-weight-asian="bold" style:font-weight-complex="bold"/>
    </style:style>
    <style:style style:name="P11" style:family="paragraph" style:parent-style-name="Standard" style:list-style-name="L4">
      <style:paragraph-properties fo:line-height="115%" fo:text-align="justify" style:justify-single-word="false"/>
      <style:text-properties fo:color="#000000" loext:opacity="100%" style:font-name="Nimbus Roman" officeooo:rsid="0020ad95" officeooo:paragraph-rsid="0020ad95"/>
    </style:style>
    <style:style style:name="P12" style:family="paragraph" style:parent-style-name="Text_20_body" style:list-style-name="L1">
      <style:paragraph-properties fo:margin-top="0in" fo:margin-bottom="0in" style:contextual-spacing="false" fo:line-height="115%" fo:text-align="justify" style:justify-single-word="false"/>
    </style:style>
    <style:style style:name="P13" style:family="paragraph" style:parent-style-name="Text_20_body" style:list-style-name="L1">
      <style:paragraph-properties fo:line-height="115%" fo:text-align="justify" style:justify-single-word="false"/>
    </style:style>
    <style:style style:name="P14" style:family="paragraph" style:parent-style-name="Text_20_body" style:list-style-name="L2">
      <style:paragraph-properties fo:margin-top="0in" fo:margin-bottom="0in" style:contextual-spacing="false" fo:line-height="115%" fo:text-align="justify" style:justify-single-word="false"/>
    </style:style>
    <style:style style:name="P15" style:family="paragraph" style:parent-style-name="Text_20_body" style:list-style-name="L2">
      <style:paragraph-properties fo:line-height="115%" fo:text-align="justify" style:justify-single-word="false"/>
    </style:style>
    <style:style style:name="P16" style:family="paragraph" style:parent-style-name="Text_20_body" style:list-style-name="L6">
      <style:paragraph-properties fo:line-height="115%" fo:text-align="justify" style:justify-single-word="false"/>
      <style:text-properties officeooo:paragraph-rsid="002248a8"/>
    </style:style>
    <style:style style:name="P17" style:family="paragraph" style:parent-style-name="Text_20_body" style:list-style-name="L6">
      <style:paragraph-properties fo:line-height="115%" fo:text-align="justify" style:justify-single-word="false"/>
      <style:text-properties officeooo:paragraph-rsid="0021db85"/>
    </style:style>
    <style:style style:name="P18" style:family="paragraph" style:parent-style-name="Text_20_body" style:list-style-name="L7">
      <style:paragraph-properties fo:line-height="115%" fo:text-align="justify" style:justify-single-word="false"/>
      <style:text-properties officeooo:paragraph-rsid="0021db85"/>
    </style:style>
    <style:style style:name="P19" style:family="paragraph" style:parent-style-name="Text_20_body" style:list-style-name="L5">
      <style:paragraph-properties fo:line-height="115%" fo:text-align="justify" style:justify-single-word="false"/>
      <style:text-properties officeooo:paragraph-rsid="0021db85"/>
    </style:style>
    <style:style style:name="P20" style:family="paragraph" style:parent-style-name="Text_20_body">
      <style:paragraph-properties fo:line-height="115%" fo:text-align="justify" style:justify-single-word="false"/>
      <style:text-properties fo:color="#000000" loext:opacity="100%" style:font-name="Nimbus Roman" fo:font-weight="bold" officeooo:rsid="0021db85" officeooo:paragraph-rsid="0021db85" style:font-weight-asian="bold" style:font-weight-complex="bold"/>
    </style:style>
    <style:style style:name="P21" style:family="paragraph" style:parent-style-name="Text_20_body" style:list-style-name="L4">
      <style:paragraph-properties fo:line-height="115%" fo:text-align="justify" style:justify-single-word="false"/>
      <style:text-properties fo:color="#000000" loext:opacity="100%" style:font-name="Nimbus Roman"/>
    </style:style>
    <style:style style:name="P22" style:family="paragraph" style:parent-style-name="Text_20_body" style:list-style-name="L5">
      <style:paragraph-properties fo:line-height="115%" fo:text-align="justify" style:justify-single-word="false"/>
      <style:text-properties fo:color="#000000" loext:opacity="100%" style:font-name="Nimbus Roman"/>
    </style:style>
    <style:style style:name="P23" style:family="paragraph" style:parent-style-name="Text_20_body" style:list-style-name="L4">
      <style:paragraph-properties fo:line-height="115%" fo:text-align="justify" style:justify-single-word="false"/>
      <style:text-properties fo:color="#000000" loext:opacity="100%" style:font-name="Nimbus Roman" officeooo:rsid="0020ad95" officeooo:paragraph-rsid="0020ad95"/>
    </style:style>
    <style:style style:name="P24" style:family="paragraph" style:parent-style-name="Text_20_body" style:list-style-name="L5">
      <style:paragraph-properties fo:line-height="115%" fo:text-align="justify" style:justify-single-word="false"/>
      <style:text-properties fo:color="#000000" loext:opacity="100%" style:font-name="Nimbus Roman" officeooo:rsid="0021db85" officeooo:paragraph-rsid="0021db85"/>
    </style:style>
    <style:style style:name="P25" style:family="paragraph" style:parent-style-name="Text_20_body" style:list-style-name="L6">
      <style:paragraph-properties fo:line-height="115%" fo:text-align="justify" style:justify-single-word="false"/>
      <style:text-properties fo:color="#000000" loext:opacity="100%" style:font-name="Nimbus Roman" officeooo:rsid="0021db85" officeooo:paragraph-rsid="0021db85"/>
    </style:style>
    <style:style style:name="P26" style:family="paragraph" style:parent-style-name="Text_20_body" style:list-style-name="L6">
      <style:paragraph-properties fo:line-height="115%" fo:text-align="justify" style:justify-single-word="false"/>
      <style:text-properties fo:color="#000000" loext:opacity="100%" style:font-name="Nimbus Roman" officeooo:rsid="002248a8" officeooo:paragraph-rsid="002248a8"/>
    </style:style>
    <style:style style:name="P27" style:family="paragraph" style:parent-style-name="Text_20_body">
      <style:paragraph-properties fo:line-height="115%" fo:text-align="justify" style:justify-single-word="false"/>
      <style:text-properties fo:font-variant="normal" fo:text-transform="none" fo:color="#000000" loext:opacity="100%" style:font-name="Nimbus Roman" fo:font-size="12pt" fo:letter-spacing="normal" fo:font-style="normal" fo:font-weight="bold" officeooo:rsid="002248a8" officeooo:paragraph-rsid="002248a8" style:font-weight-asian="bold" style:font-weight-complex="bold"/>
    </style:style>
    <style:style style:name="T1" style:family="text">
      <style:text-properties officeooo:rsid="001f5c21"/>
    </style:style>
    <style:style style:name="T2" style:family="text">
      <style:text-properties officeooo:rsid="0020ad95"/>
    </style:style>
    <style:style style:name="T3" style:family="text">
      <style:text-properties officeooo:rsid="002248a8"/>
    </style:style>
    <style:style style:name="T4" style:family="text">
      <style:text-properties fo:font-variant="normal" fo:text-transform="none" fo:font-size="12pt" fo:letter-spacing="normal" fo:font-style="normal" fo:font-weight="normal"/>
    </style:style>
    <style:style style:name="T5" style:family="text">
      <style:text-properties style:font-name="Nimbus Roman"/>
    </style:style>
    <style:style style:name="T6" style:family="text">
      <style:text-properties style:font-name="Nimbus Roman" officeooo:rsid="002248a8"/>
    </style:style>
    <style:style style:name="T7" style:family="text">
      <style:text-properties style:font-name="Nimbus Roman" fo:font-weight="normal" officeooo:rsid="002248a8" style:font-weight-asian="normal" style:font-weight-complex="normal"/>
    </style:style>
    <style:style style:name="T8" style:family="text">
      <style:text-properties fo:font-weight="bold" style:font-weight-asian="bold" style:font-weight-complex="bold"/>
    </style:style>
    <style:style style:name="T9" style:family="text">
      <style:text-properties fo:color="#000000" loext:opacity="100%" style:font-name="Nimbus Roman" officeooo:rsid="0020ad95"/>
    </style:style>
    <style:style style:name="T10" style:family="text">
      <style:text-properties fo:color="#000000" loext:opacity="100%" style:font-name="Nimbus Roman" fo:font-weight="bold" officeooo:rsid="002248a8" style:font-weight-asian="bold" style:font-weight-complex="bold"/>
    </style:style>
    <style:style style:name="T11" style:family="text">
      <style:text-properties fo:color="#000000" loext:opacity="100%" style:font-name="Nimbus Roman" fo:font-weight="bold" officeooo:rsid="0021db85"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SiSi ID:/23B1NUM0114/</text:p>
      <text:p text:style-name="P4">Нэр: Н. Мөнхпүрэв</text:p>
      <text:p text:style-name="P1"/>
      <text:p text:style-name="P8">Requirements Analysis Strategies</text:p>
      <text:p text:style-name="P1">Төслийн баг нь ямар шаардлагууд тохирохыг тогтоохоосоо өмнө нь, системийн төрөл болон байгууллагад ямар төрлийн өөрчлөлт дагуулахыг тодорхой ойлгох хэрэгтэй. Шинжилгээний үндсэн процесс нь гурван алхамтай: <text:span text:style-name="T1">Одоогийн системийг ойлгох, сайжруулалтыг тодорхойлох, ирээдүйн системийн шаардлагыг боловсруулах.</text:span></text:p>
      <text:p text:style-name="P1"/>
      <text:p text:style-name="P2">Шаардлагын шинжилгээний гурван стратеги болох бизнесийн процессийн автоматжуулалт (BPA), бизнесийн процессийн сайжруулалт (BPI), бизнесийн процессийн шинэтгэл (BPR) нь энэ үйл явцыг удирдахад тусалдаг. Шаардлагын стратеги сонгох нь хүсэж буй өөрчлөлтийн хэмжээнээс хамаардаг бөгөөд бага хэмжээний сайжруулалт (BPA)-аас бүтэн шинэчлэл (BPR)-д хүрдэг. <text:span text:style-name="T2">Критикал</text:span> сэтгэх чадвар нь бизнесийн процессийг ойлгох, сайжруулах, шаардлагыг шинэ систем рүү хөрвүүлэхэд чухал юм.</text:p>
      <text:p text:style-name="P2"/>
      <text:p text:style-name="P9">Business Process Automation (BPA)</text:p>
      <text:p text:style-name="P3">BPA (Бизнесийн Процессийн Автоматжуулалт) нь байгууллагын үйл ажиллагааны үндсэн аргыг өөрчлөхгүй харин ч зарим ажлыг автоматжуулахын тулд компьютерийн технологийг ашигладаг. BPA нь байгууллагыг илүү үр ашигтай болгох боловч бизнесийн үйл ажиллагаанд хамгийн бага нөлөө үзүүлдэг. BPA төслүүдийн төлөвлөгчид одоогийн системийг сайжруулалт, ирээдүйн системийн шаардлагууд руу шилжихээсээ өмнө ихээхэн хугацааг одоогийн системийг ойлгоход зарцуулдаг. Проблемийн шинжилгээ болон үндсэн шалтгааны шинжилгээ нь BPA-ийн түгээмэл хэрэглэгддэг хоёр техник юм.</text:p>
      <text:p text:style-name="P3"/>
      <text:list text:style-name="L3">
        <text:list-item>
          <text:p text:style-name="P10">Problem Ananlyis</text:p>
          <text:p text:style-name="P7"><text:span text:style-name="T9">Асуудлын шинжилгээ нь хэрэглэгчид болон менежерүүдээс одоогийн системийн асуудлуудыг тодорхойлж, ирээдүйн системд тэдгээрийг хэрхэн шийдэхийг санал болгох арга юм. Энэ нь жижиг, алхам алхамаар сайжруулалтыг авчирдаг, жишээ нь бичих орон зай нэмэх эсвэл шинэ тайлан гаргах. Ийм сайжруулалт нь системийн үр ашиг болон хэрэглэхэд хялбар байдлыг сайжруулдаг ч бизнесийн үнэ цэнийг томоохон хэмжээгээр нэмэгдүүлэх нь хэцүү байна.</text:span></text:p>
        </text:list-item>
      </text:list>
      <text:p text:style-name="P3"/>
      <text:list text:style-name="L4">
        <text:list-item>
          <text:p text:style-name="P11"><text:span text:style-name="T8">Root Cause Analysis</text:span> </text:p>
          <text:p text:style-name="P23">Асуудлын шинжилгээний санаанууд ихэвчлэн асуудлын шийдлүүдийг санал болгодог бөгөөд эдгээр шийдлүүд нь асуудлын мөн чанарыг зөв ойлгохгүйгээр хийсвэр таамаглал дээр суурилдаг. Хэрэглэгчид болон олон хүмүүс асуудлыг бүрэн ойлгохгүйгээр шийдлүүдэд шууд хүрдэг. Заримдаа шийдлүүд зөв байдаг ч ихэнх тохиолдолд эдгээр нь асуудлын шинж тэмдгийг л шийддэг бөгөөд үндсэн шалтгааныг шийддэггүй.</text:p>
          <text:p text:style-name="P21">Үндсэн шалтгааны шинжилгээ нь зөвхөн шийдлүүд биш, харин асуудлууд дээр төвлөрдөг. Шинжилгээчид хэрэглэгчдийг одоогийн системтэй холбоотой асуудлуудын жагсаалтыг гаргахыг хүсч, дараа нь эдгээр асуудлуудыг чухал байдлаар эрэмбэлдэг. <text:soft-page-break/>Дараа нь хамгийн чухал асуудлаас эхлэн бүх боломжит үндсэн шалтгаануудыг олж, тэдгээрийг судалдаг. Хэрэглэгчид болон шинжилгээчид үндсэн шалтгаануудыг тодорхойлж, зөвхөн мэдэгдэхүйц шийдлийг бус, үнэхээрийн үндсэн шалтгаануудыг илрүүлнэ.</text:p>
        </text:list-item>
      </text:list>
      <text:p text:style-name="P20">Business Process Improvement (BPI)</text:p>
      <text:p text:style-name="P5">BPI (Бизнесийн Процессийн Сайжруулалт) нь байгууллагын үйл ажиллагааг дунд зэргийн өөрчлөлттэйгөөр өөрчлөн шинэ технологиос ашиг тус олох эсвэл өрсөлдөгчдийн хийж буй зүйлийг дууриах зорилгоор ашиглагддаг. BPI нь үр ашиг (тогтмол зүйлсийг зөв хийх) болон үр бүтээмжийг (зөв зүйлсийг хийх) сайжруулдаг. BPI төслийн төлөвлөгчид одоогийн системийг ойлгох хугацаа зарцуулдаг боловч BPA төслүүдтэй харьцуулахад бага; тэдний гол анхаарал нь бизнесийн процессуудыг сайжруулахад чиглэдэг. Тиймээс одоогийн системийг сайжруулах шинжилгээ болон ирээдүйн системийн шаардлагуудын тусламжтайгаар ойлгох хэрэгтэй. Үргэлжлэх хугацааны шинжилгээ, үйл ажиллагаанд суурилсан зардал тооцох, болон албан бус хэмжилт хийх нь BPI-ийн түгээмэл үйл ажиллагаанууд юм.</text:p>
      <text:list text:style-name="L5">
        <text:list-item>
          <text:p text:style-name="P24"><text:span text:style-name="T8">Duration Analysis</text:span> </text:p>
          <text:p text:style-name="P24">Үргэлжлэх хугацааны шинжилгээ нь одоогийн системд бүх процессуудыг гүйцэтгэхэд зарцуулагдах цагийг нарийн судлах шаардлагатай. Шинжилгээчид эхлээд нэг жишээ оролтоор бизнесийн процессийн цогцын дундаж хугацааг тодорхойлно. Дараа нь бизнесийн процессийн тус бүр алхмыг (эсвэл дэд процесс) цаг хэмжиж, үндсэн алхмуудыг дуусгах хугацааг нийлүүлж, бүх процессыг дуусгах хугацаатай харьцуулна. Хоёрын хоорондох том ялгаа, бидний туршлагаар процессын нийт хугацаа нь хэсгүүдийн нийлбэрээс 10 эсвэл 100 дахин урт байж болох нь уг процессийн гүнзгий өөрчлөлт шаардлагатай байгааг илтгэдэг.</text:p>
          <text:p text:style-name="P22">Жишээ нь, шинжилгээчид гэрийн зээлийн систем дээр ажиллаж, банк нь дунджаар 30 хоногт зээлийг батлахыг олж мэдлээ. Тэд дараа нь процессийн үндсэн алхмуудыг (жишээ нь, өгөгдөл оруулах, зээлийн шалгалт хийх, гарын үсэг шалгах, үнэлгээ хийх) харахад нэг зээлийн төлөвлөгөөн дээр зарцуулсан нийт хугацаа нь 8 цаг байна. Энэ нь бүхэл бүтэн процесс нь маш их зөрүүтэй гэдгийг тодорхой харуулж байгаа бөгөөд нэг өдрийн ажлыг 30 хоногт хийж байгаа нь процессыг оновчтой болгох шаардлагатай гэсэн үг юм.</text:p>
          <text:p text:style-name="P22">Энэ асуудал нь процесс муу салангид болсон байж магадгүй. Тусгай хүмүүс олон төрлийн үйл ажиллагааг гүйцэтгэх шаардлагатай бөгөөд процесс дуусах хүртэл удаан хугацаанд олон хүний ширээн дээр байх боломжтой. Гэрийн зээлийн жишээнд, бүртгэлийг боловсруулалгүй олон хүн захиргааны үүргээ гүйцэтгэж, процесс нь удааширдаг.</text:p>
          <text:p text:style-name="P22">Ийм төрлийн процессыг процессийн интеграци буюу параллелчлалын зохион байгуулалт хийх шаардлагатай байдаг. Процессийн интеграци нь үндсэн процессыг өөрчлөн, бага хүмүүс оролцуулахыг хэлнэ, энэ нь процессуудыг өөрчилж, ажилтнуудыг олон төрлийн үүргийг гүйцэтгэхэд сургах шаардлагатай. Процессийн параллелчлал нь процессийг өөрчилж, бүх алхмуудыг нэгэн зэрэг гүйцэтгэх <text:soft-page-break/>боломжийг бүрдүүлнэ. Жишээ нь, гэрийн зээлийн өргөдөлд, зээлийн шалгалтыг үнэлгээ болон гарын үсэг шалгалттай зэрэг гүйцэтгэх боломжтой.</text:p>
        </text:list-item>
        <text:list-item>
          <text:p text:style-name="P19"><text:span text:style-name="T11">Activity-Based Costing</text:span></text:p>
          <text:p text:style-name="P24">Үйл ажиллагаанд суурилсан зардал тооцох (Activity-based costing) нь хугацаа биш, харин бизнесийн процессыг гүйцэтгэхэд зарцуулсан зардлыг шинжилдэг. Шинжилгээчид үндсэн үйл ажиллагааны алхам бүрт хамаарах зардлыг тодорхойлж, хамгийн өндөр зардалтай үйл ажиллагаануудыг илрүүлэн, тэдгээрийг сайжруулахад анхаарлаа төвлөрүүлдэг.</text:p>
          <text:p text:style-name="P22">Зардлыг тооцоолох нь зарчмын хувьд энгийн. Шинжилгээчид үйл явц бүрийн шууд хөдөлмөр болон материалын зардлыг шалгадаг. Үйлдвэрлэлийн процесс дахь материалын зардлыг хялбархан тодорхойлж болно, харин хөдөлмөрийн зардлыг оролтод зарцуулсан хугацаа болон ажилтны цагийн хөлсөөр тооцдог. Гэвч удирдлагын бүртгэлээс санаж байгаагаар, түрээслэх, элэгдэл гэх мэт шууд бус зардлуудыг үйл ажиллагааны зардалд оруулах боломжтой.</text:p>
        </text:list-item>
        <text:list-item>
          <text:p text:style-name="P19"><text:span text:style-name="T11">Informal Benchmarking</text:span></text:p>
          <text:p text:style-name="P24">Бенчмаркинг нь бусад байгууллагуудын бизнесийн процессыг судалж, таны байгууллага илүү сайн гүйцэтгэх арга замыг суралцах үйл явц юм. Албан бус бенчмаркинг нь хэрэглэгчтэй харилцах бизнесийн процессууд дээр түгээмэл байдаг бөгөөд менежерүүд болон шинжилгээчид бусад байгууллагуудыг судалж, тэдний туршлагаас санаа авахыг зорьдог. Жишээ нь, автомашины худалдаа эрхлэгч вэбсайт боловсруулж байгаа тохиолдолд өрсөлдөгчид болон бусад салбарын шагналт вэбсайтуудыг судлах нь үр дүнтэй байдаг.</text:p>
        </text:list-item>
      </text:list>
      <text:p text:style-name="P20">Business Process Reengineering</text:p>
      <text:p text:style-name="P5">BPR (Бизнесийн Процессийн Шинэчлэл) нь байгууллагын үйл ажиллагааг үндсээр нь өөрчилж, шинэ санаа болон технологийг ашиглан томоохон өөрчлөлтүүд хийх үйл явц юм. Энэ нь одоогийн системийг ойлгохдоо бага хугацаа зарцуулж, шинэ аргуудыг хайж, үр дүнгийн шинжилгээ, технологийн шинжилгээ, үйл ажиллагааг устгах зэрэг үйлдлүүдийг хийдэг.</text:p>
      <text:list text:style-name="L7">
        <text:list-item>
          <text:p text:style-name="P18"><text:span text:style-name="T11">Outcome analysis</text:span></text:p>
        </text:list-item>
      </text:list>
      <text:list text:style-name="L6">
        <text:list-header>
          <text:p text:style-name="P25">Үр дүнгийн шинжилгээ нь үйлчлүүлэгчдэд үнэ цэнийг өгдөг үндсэн үр дүнгүүдийг тодорхойлоход чиглэдэг бөгөөд эдгээр нь дангаараа илэрхий байдаггүй. Энэ аргачлалаар системийн шинжилгээчид менежерүүд болон төслийн ивээн тэтгэгчдийг үйлчлүүлэгчийн хувьд бодохыг уриалж, байгууллагын бүтээгдэхүүн эсвэл үйлчилгээнд ямар үнэт зүйлс өгч байгааг анхааралтайгаар бодохыг хүсдэг.</text:p>
        </text:list-header>
        <text:list-item>
          <text:p text:style-name="P17"><text:span text:style-name="T11">Technology Analysis</text:span></text:p>
          <text:p text:style-name="P25"><text:span text:style-name="T3">Технологийн</text:span> шинжилгээ нь шинжилгээчид болон менежерүүдэд чухал болон сонирхолтой технологийн жагсаалтыг гаргаж эхлэхээс эхэлнэ. Дараа нь бүлэг системтэйгээр тус бүрийн технологийг бизнесийн процессэд хэрхэн ашиглах боломжтойг тодорхойлж, бизнес ямар ашиг тустай болохыг тодорхойлно.</text:p>
        </text:list-item>
        <text:list-item>
          <text:p text:style-name="P16"><text:soft-page-break/><text:span text:style-name="T10">Activity Elimination</text:span></text:p>
          <text:p text:style-name="P26"><text:span text:style-name="T4">Үйл ажиллагаа арилгах нь яг нэрнээс нь харагдах шиг үйл ажиллагааг устгах үйл явц юм. Аналитикч болон менежерүүд хамтран ажиллаж, бизнесийн үйл явц дахь үйл ажиллагаа бүрийг хэрхэн арилгах, энэ үйл ажиллагаагүйгээр функцийг хэрхэн яаж ажиллуулах, ямар үр дагавар гарахыг тодорхойлдог. Эхэндээ менежерүүд үйл явцыг арилгах боломжтой гэж дүгнэхэд эргэлздэг ч энэ нь тэднийг үйл ажиллагаа бүрийг арилгахыг шаарддаг дасгал юм. Зарим тохиолдолд үр дүн нь утгагүй мэт санагддаг ч оролцогчид бизнесийн үйл явц дахь үйл ажиллагаа бүрийг авч үзэх ёстой.</text:span><text:line-break/><text:span text:style-name="T4">Жишээлбэл, өмнө нь хэлэлцсэн зээлийн баталгаажуулах үйл явц дээр менежер болон аналитикч нар эхний үйл ажиллагаа болох мэдээллийг зээлийн компанийн компьютерт оруулахыг арилгахаас эхэлдэг. Энэ нь компьютерийн системийг ашиглахаа больё, эсвэл өөр хэн нэгэн (жишээ нь, интернетаар хэрэглэгч) мэдээлэл оруулах гэсэн хоёр боломжийг бий болгодог. Дараа нь тэд дараагийн үйл ажиллагаа болох зээлийн шалгалтыг арилгадаг. Утгагүй санагддаг тийм үү? Гэхдээ бодит байдал дээр зээлийн шалгалт хэр олон удаа муудсан өргөдлийг илрүүлж байгаагаас хамаарна. Хэрэв бараг бүх өргөдөлд сайн зээлийн түүх байгаа бөгөөд зээлийн шалгалтаар татгалзсан тохиолдол ховор байдаг бол зээлийн шалгалтын зардал нь цөөн хэдэн муу зээлээс урьдчилан сэргийлэх зардлаас илүү үнэтэй байж болно.</text:span></text:p>
        </text:list-item>
      </text:list>
      <text:p text:style-name="P27">Selecting Appropriete Strategies</text:p>
      <text:p text:style-name="P6">Энэхүү бүлэгт хэлэлцсэн бүх техникийг өөрийн давуу болон сул талуудтай (Зураг 3-5-г харна уу). Хэзээ ч нэг техникийг бусдаас илүү сайн гэж үзэхгүй бөгөөд, амьдралд ихэнх төслүүд нь техникийг хослуулан ашигладаг.</text:p>
      <text:list text:style-name="L1">
        <text:list-item>
          <text:p text:style-name="P12"><text:span text:style-name="Strong_20_Emphasis"><text:span text:style-name="T6">Potential business Value</text:span></text:span><text:span text:style-name="T5">: BPA нь бизнесийг сайжруулах боломжтой ч ихэнх ашиг тус нь taktikal бөгөөд жижиг байдаг. BPA нь бизнесийн процессыг өөрчлөхгүй, зөвхөн түүний үр ашгийг сайжруулдаг. BPI нь төслийн хүрээнээс хамааран дунд зэргийн ашиг тусыг санал болгодог, учир нь энэ нь бизнесийг тодорхой хэмжээгээр өөрчлөхийг зорьдог. Энэ нь үр ашиг, үр дүнг нэмэгдүүлэх боломжтой. BPR нь бизнесийг үндсээр нь сайжруулахыг зорьдог тул томоохон ашиг тусыг бий болгодог.</text:span></text:p>
        </text:list-item>
        <text:list-item>
          <text:p text:style-name="P12"><text:span text:style-name="Strong_20_Emphasis"><text:span text:style-name="T6">Project Cost</text:span></text:span><text:span text:style-name="T5">: Төслийн зардал нь үргэлж чухал байдаг. Ерөнхийдөө BPA нь хамгийн бага зардалтай бөгөөд хамгийн нарийн төвөгтэй зүйлсийг хийхийг хүсдэг. BPI нь төслийн хүрээнээс хамааран дунд зэргийн үнэтэй байж болно. BPR нь ихэвчлэн өндөр зардалтай байдаг, учир нь ахлах менежерүүдээс их хэмжээний цаг шаарддаг ба бизнесийн процессыг дахин зохион байгуулах нь их байдаг.</text:span></text:p>
        </text:list-item>
        <text:list-item>
          <text:p text:style-name="P13"><text:span text:style-name="Strong_20_Emphasis"><text:span text:style-name="T7">Breadth of Analysis</text:span></text:span><text:span text:style-name="T5">: Шалгалтын хүрээ нь шинжилгээг хэр өргөн хүрээтэй хийхийг илэрхийлдэг, үүнд нэг бизнесийн функцийн хүрээний бизнесийн процессыг багтаах эсвэл байгууллага хоорондын бизнесийн үйл явц эсвэл хэрэглэгч, ханган нийлүүлэгчийн байгууллагуудтай харилцан үйлчлэлцэх процессыг багтаах юм. BPR нь өргөн харах өнцөгтэй бөгөөд олон байгууллагаас хэд хэдэн чухал бизнесийн процессыг хамардаг. BPI нь илүү нарийн хүрээтэй бөгөөд нэг эсвэл хэд хэдэн бизнесийн үйл ажиллагааг агуулдаг. BPA нь ерөнхийдөө нэг процессыг шинжилдэг.</text:span></text:p>
        </text:list-item>
      </text:list>
      <text:p text:style-name="P6"><text:soft-page-break/>Эцсийн асуудал бол амжилтгүй байх эрсдэл юм, энэ нь муу дизайнаас, хэрэгцээний биелүүлэлтгүй байдлаас, эсвэл байгууллагын чадварт хэтэрхий их өөрчлөлт оруулснаас үүдэлтэй амжилтгүй болох магадлалаас хамаардаг.</text:p>
      <text:list text:style-name="L2">
        <text:list-item>
          <text:p text:style-name="P14"><text:span text:style-name="Strong_20_Emphasis"><text:span text:style-name="T5">BPA ба BPI</text:span></text:span><text:span text:style-name="T5">: Эдгээр нь багаас дунд эрсдэлтэй байдаг, учир нь хэрэгжүүлэх систем нь тодорхой, ойлгомжтой бөгөөд түүний бизнесэд үзүүлэх нөлөөг хэрэгжүүлэхээс өмнө үнэлж болно.</text:span></text:p>
        </text:list-item>
        <text:list-item>
          <text:p text:style-name="P15"><text:span text:style-name="Strong_20_Emphasis"><text:span text:style-name="T5">BPR</text:span></text:span><text:span text:style-name="T5">: BPR нь илүү өндөр эрсдэлтэй байдаг, учир нь энэ нь урьдчилан таамаглах боломжгүй өөрчлөлтүүдийг агуулдаг. Энэ нь маш эрсдэлтэй бөгөөд зөвхөн байгууллага болон түүний удирдлагууд томоохон өөрчлөлтүүдийг хийхэд бэлэн байвал хэрэгжүүлж болохоор төсөл юм. BPR-ийн эцэг Майк Хаммер нь BPR төслүүдийн 70 хувь нь амжилтгүй болдог гэж тооцоолсон.</text:span></text:p>
        </text:list-item>
      </text:list>
      <text:p text:style-name="P6"/>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02:13:56.302352566</meta:creation-date>
    <meta:generator>LibreOffice/24.2.7.2$Linux_X86_64 LibreOffice_project/420$Build-2</meta:generator>
    <dc:date>2025-02-26T10:23:48.384537856</dc:date>
    <meta:editing-duration>PT18M30S</meta:editing-duration>
    <meta:editing-cycles>3</meta:editing-cycles>
    <meta:document-statistic meta:table-count="0" meta:image-count="0" meta:object-count="0" meta:page-count="5" meta:paragraph-count="40" meta:word-count="1504" meta:character-count="11431" meta:non-whitespace-character-count="9990"/>
  </office:meta>
</office:document-meta>
</file>