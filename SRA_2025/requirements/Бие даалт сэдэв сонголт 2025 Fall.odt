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justify" style:justify-single-word="false"/>
      <style:text-properties style:rfc-language-tag="mn-Cyrl-MN" fo:language="mn" fo:script="Cyrl" fo:country="MN" officeooo:rsid="000b9b8f" officeooo:paragraph-rsid="000b9b8f"/>
    </style:style>
    <style:style style:name="P2" style:family="paragraph" style:parent-style-name="Standard">
      <style:paragraph-properties fo:text-align="justify" style:justify-single-word="false"/>
      <style:text-properties style:rfc-language-tag="mn-Cyrl-MN" fo:language="mn" fo:script="Cyrl" fo:country="MN"/>
    </style:style>
    <style:style style:name="P3" style:family="paragraph" style:parent-style-name="Standard">
      <style:paragraph-properties fo:text-align="justify" style:justify-single-word="false"/>
      <style:text-properties officeooo:rsid="000b9b8f" officeooo:paragraph-rsid="000b9b8f"/>
    </style:style>
    <style:style style:name="P4" style:family="paragraph" style:parent-style-name="Standard">
      <style:paragraph-properties fo:text-align="justify" style:justify-single-word="false"/>
    </style:style>
    <style:style style:name="P5" style:family="paragraph" style:parent-style-name="Standard" style:list-style-name="WWNum2">
      <style:paragraph-properties fo:text-align="justify" style:justify-single-word="false"/>
    </style:style>
    <style:style style:name="P6" style:family="paragraph" style:parent-style-name="Standard" style:list-style-name="WWNum3">
      <style:paragraph-properties fo:text-align="justify" style:justify-single-word="false"/>
    </style:style>
    <style:style style:name="T1" style:family="text">
      <style:text-properties style:rfc-language-tag="mn-Cyrl-MN" fo:language="mn" fo:script="Cyrl" fo:country="MN"/>
    </style:style>
    <style:style style:name="T2" style:family="text">
      <style:text-properties style:rfc-language-tag="mn-Cyrl-MN" fo:language="mn" fo:script="Cyrl" fo:country="MN" officeooo:rsid="000b8f19"/>
    </style:style>
    <style:style style:name="T3" style:family="text">
      <style:text-properties style:rfc-language-tag="mn-Cyrl-MN" fo:language="mn" fo:script="Cyrl" fo:country="MN" officeooo:rsid="000be14e"/>
    </style:style>
    <style:style style:name="T4" style:family="text">
      <style:text-properties style:rfc-language-tag="mn-Cyrl-MN" fo:language="mn" fo:script="Cyrl" fo:country="MN" officeooo:rsid="000d1c5d"/>
    </style:style>
    <style:style style:name="T5" style:family="text">
      <style:text-properties officeooo:rsid="000b8f19"/>
    </style:style>
    <style:style style:name="T6" style:family="text">
      <style:text-properties officeooo:rsid="001f07e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Оюутны </text:span>ID: <text:span text:style-name="T5">23B1NUM0114</text:span></text:p>
      <text:p text:style-name="P4"><text:span text:style-name="T1">Оюутны нэр: </text:span><text:span text:style-name="T2">Н. Мөнхпүрэв</text:span></text:p>
      <text:p text:style-name="P2">Асуудал 1:</text:p>
      <text:p text:style-name="P1">Шуудангийн систем буюу <text:span text:style-name="T6">21 аймгаас нийслэл рүү эсвэл бусад аймаг руу илгээмжийн найдвартай түргэн шуурхай, аюулгүй байдалтай цуг хангасан програм хангамж хомс. Бид одоо хүртэл танихгүй хүнд дайвар болгон илгээдэг. Хэдий монгол шуудан үйл ажиллагаа явуулсаар байгаа ч системийн ашигладаггүй. Системтэй эсэхийг ч үл мэднэ.</text:span></text:p>
      <text:p text:style-name="P2">Асуудал 2:</text:p>
      <text:p text:style-name="P3"><text:span text:style-name="T1">Нийт иргэдийн тодорхой хувь нь хуулийн тухай мэдлэг хомс, хуулинд орч буй өөрчлөлтүүдийг тэр бүр мэдээд байдаггүй. Тухайлбал ахлах сургуулиа төгсөөд оюутан болж буй </text:span><text:span text:style-name="T3">хүүхдээс хуулийн мэдлэг хүлээх нь ч утгагүй шүү дээ. Үүнээс болж оюутан хүүхэд нийгэмтэй харилцахад жишээ нь чөлөөт цагаараа бүтэн эсвэл хагас цагийн ажил хийхэд хөдөлмөрийн тухай хуулийн мэдлэггүйгээс болж хөдөлмөрийн мөлжлөг, залилуулах хэрэг олон гарч буй. Мөн байдаг хуулийн сайтуудад хуулийн заалтуудыг шууд тусгаж өгсөн байдаг нь шинэхэн төгссөөд оюутан болж буй хүүхдүүд ойлгохгүй шүү дээ. Иймд хуулийн заалтуудыг шууд бусаар тусган бүрэн дунд боловсролтой хэнбугайд ч ойлгож, мэдэхэд туслах. </text:span><text:span text:style-name="T4">Мөн өөрчлөгдөж, шинээр нэмэгдэж буй хуулийн заалтуудыг тухайн хууль нь шууд болон шууд бусаар нөлөөлдөг хүмүүст мэдэгдэх нь зүйтэй.</text:span></text:p>
      <text:p text:style-name="P2"/>
      <text:p text:style-name="P2">Бие даалтын сэдэв сонголт</text:p>
      <text:list text:style-name="WWNum2">
        <text:list-item>
          <text:p text:style-name="P5">ПХ-ын нэр:</text:p>
        </text:list-item>
        <text:list-item>
          <text:p text:style-name="P5">ПХ-ын зориулалт:</text:p>
        </text:list-item>
        <text:list-item>
          <text:p text:style-name="P5">ПХ-ын зорилтод хэрэглэгч:</text:p>
        </text:list-item>
        <text:list-item>
          <text:p text:style-name="P5">ПХ-ыг ашигласнаар үүсэх ач холбогдол</text:p>
        </text:list-item>
      </text:list>
      <text:p text:style-name="P2"/>
      <text:p text:style-name="P2">Бие даалтыг гүйцэтгэхэд нэмэлтээр ашиглах материал, мэдээллийн эх сурвалж:</text:p>
      <text:list text:style-name="WWNum3">
        <text:list-item>
          <text:p text:style-name="P6">Ижил төстэй ПХ-ууд</text:p>
        </text:list-item>
        <text:list-item>
          <text:p text:style-name="P6">Хэрэглэгч, сонирхлын бүлгүүд</text:p>
        </text:list-item>
        <text:list-item>
          <text:p text:style-name="P6">Холбогдох баримт материалын жагсаалт</text:p>
        </text:list-item>
        <text:list-item>
          <text:p text:style-name="P6">Бусад</text:p>
        </text:list-item>
      </text:list>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Calibri" style:font-size-asian="12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Calibri" style:font-size-asian="12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er</meta:initial-creator>
    <meta:editing-cycles>4</meta:editing-cycles>
    <meta:creation-date>2025-09-01T02:01:00</meta:creation-date>
    <dc:date>2025-09-11T22:50:30.309769304</dc:date>
    <meta:editing-duration>PT23M24S</meta:editing-duration>
    <meta:generator>LibreOffice/24.2.7.2$Linux_X86_64 LibreOffice_project/420$Build-2</meta:generator>
    <meta:document-statistic meta:table-count="0" meta:image-count="0" meta:object-count="0" meta:page-count="1" meta:paragraph-count="16" meta:word-count="214" meta:character-count="1470" meta:non-whitespace-character-count="1280"/>
    <meta:user-defined meta:name="AppVersion">16.0000</meta:user-defined>
    <meta:template xlink:type="simple" xlink:actuate="onRequest" xlink:title="Normal" xlink:href=""/>
  </office:meta>
</office:document-meta>
</file>